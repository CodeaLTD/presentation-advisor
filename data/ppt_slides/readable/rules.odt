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3721" officeooo:paragraph-rsid="00143721"/>
    </style:style>
    <style:style style:name="P2" style:family="paragraph" style:parent-style-name="Standard">
      <style:text-properties officeooo:rsid="0014a7fa" officeooo:paragraph-rsid="0014a7fa"/>
    </style:style>
    <style:style style:name="T1" style:family="text">
      <style:text-properties fo:language="bg" fo:country="BG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span text:style-name="T1">Всичко по слайда да е видимо и лесно разчетимо</text:span></text:p>
      <text:p text:style-name="P1"><text:span text:style-name="T1">2.Текста да може да бъде прочетен за 2 мин</text:span></text:p>
      <text:p text:style-name="P1"><text:span text:style-name="T1">3.Цветовете да не сливат</text:span></text:p>
      <text:p text:style-name="P1"><text:span text:style-name="T1">4.Да не е използван трудно разчетим шрифт</text:span></text:p>
      <text:p text:style-name="P2"><text:span text:style-name="T1">5.</text:span><text:span text:style-name="T2">Source can be less readable 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1T20:11:37.780000000</meta:creation-date>
    <dc:date>2024-05-11T20:21:26.515000000</dc:date>
    <meta:editing-duration>PT9M48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5" meta:word-count="35" meta:character-count="186" meta:non-whitespace-character-count="156"/>
  </office:meta>
</office:document-meta>
</file>